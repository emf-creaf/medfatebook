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A000003AA48348AEB.png" manifest:media-type="image/png"/>
  <manifest:file-entry manifest:full-path="Pictures/10000001000000E1000000E1B0665A3B.png" manifest:media-type="image/png"/>
  <manifest:file-entry manifest:full-path="Pictures/10000000000000DE000000E38ACC5699.jpg" manifest:media-type="image/jpeg"/>
  <manifest:file-entry manifest:full-path="Pictures/100000000000014000000140A5659EFF.jpg" manifest:media-type="image/jpeg"/>
  <manifest:file-entry manifest:full-path="Pictures/10000001000000E1000000E1751AFA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2.857cm" fo:min-width="20.902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0.721cm" fo:min-width="20.901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1.894cm" fo:min-width="20.801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65cm" fo:min-width="0cm" fo:padding-top="0.222cm" fo:padding-bottom="0.222cm" fo:padding-left="0.347cm" fo:padding-right="0.347cm" fo:wrap-option="wrap" loext:decorative="false"/>
    </style:style>
    <style:style style:name="gr9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83cm" fo:min-width="0cm" fo:padding-top="0.222cm" fo:padding-bottom="0.222cm" fo:padding-left="0.347cm" fo:padding-right="0.347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78cm" fo:min-width="0.326cm" fo:padding-top="0.222cm" fo:padding-bottom="0.222cm" fo:padding-left="0.347cm" fo:padding-right="0.347cm" fo:wrap-option="wrap" loext:decorative="false"/>
    </style:style>
    <style:style style:name="gr1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2.57cm" fo:min-width="0cm" fo:padding-top="0.222cm" fo:padding-bottom="0.222cm" fo:padding-left="0.347cm" fo:padding-right="0.347cm" fo:wrap-option="wrap" loext:decorative="false"/>
    </style:style>
    <style:style style:name="gr1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954cm" fo:min-width="0cm" fo:padding-top="0.222cm" fo:padding-bottom="0.222cm" fo:padding-left="0.347cm" fo:padding-right="0.347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96cm" fo:min-width="0cm" fo:padding-top="0.222cm" fo:padding-bottom="0.222cm" fo:padding-left="0.347cm" fo:padding-right="0.347cm" fo:wrap-option="wrap" loext:decorative="false"/>
    </style:style>
    <style:style style:name="gr1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247cm" fo:padding-top="0.222cm" fo:padding-bottom="0.222cm" fo:padding-left="0.347cm" fo:padding-right="0.347cm" fo:wrap-option="wrap" loext:decorative="false"/>
    </style:style>
    <style:style style:name="gr1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07cm" fo:min-width="0cm" fo:padding-top="0.222cm" fo:padding-bottom="0.222cm" fo:padding-left="0.347cm" fo:padding-right="0.347cm" fo:wrap-option="wrap" loext:decorative="fals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51cm" svg:stroke-color="#3465a4" draw:marker-start-width="0.279cm" draw:marker-end-width="0.279cm" svg:stroke-linecap="butt" draw:fill="solid" draw:fill-color="#b4c7dc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996cm" fo:min-width="0cm" fo:padding-top="0.222cm" fo:padding-bottom="0.222cm" fo:padding-left="0.347cm" fo:padding-right="0.347cm" fo:wrap-option="wrap" loext:decorative="false"/>
    </style:style>
    <style:style style:name="gr24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292cm" fo:min-width="2.226cm" fo:padding-top="0.222cm" fo:padding-bottom="0.222cm" fo:padding-left="0.347cm" fo:padding-right="0.347cm" fo:wrap-option="wrap" loext:decorative="fals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62cm" fo:min-width="0.323cm" fo:padding-top="0.222cm" fo:padding-bottom="0.222cm" fo:padding-left="0.347cm" fo:padding-right="0.347cm" fo:wrap-option="wrap" loext:decorative="false"/>
    </style:style>
    <style:style style:name="gr2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208cm" fo:min-width="0cm" fo:padding-top="0.222cm" fo:padding-bottom="0.222cm" fo:padding-left="0.347cm" fo:padding-right="0.347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18cm" svg:stroke-color="#b47804" draw:fill="solid" draw:fill-color="#b2b2b2" draw:opacity-name="msTransGradient_20_1" draw:textarea-vertical-align="top" draw:auto-grow-height="false" fo:min-height="0.993cm" fo:min-width="1.169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99cm" fo:min-width="0cm" fo:padding-top="0.222cm" fo:padding-bottom="0.222cm" fo:padding-left="0.347cm" fo:padding-right="0.347cm" fo:wrap-option="wrap" loext:decorative="false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54cm" fo:min-width="0cm" fo:padding-top="0.222cm" fo:padding-bottom="0.222cm" fo:padding-left="0.347cm" fo:padding-right="0.347cm" fo:wrap-option="wrap" loext:decorative="false"/>
    </style:style>
    <style:style style:name="gr3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35cm" fo:min-width="0cm" fo:padding-top="0.222cm" fo:padding-bottom="0.222cm" fo:padding-left="0.347cm" fo:padding-right="0.347cm" fo:wrap-option="wrap" loext:decorative="fals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51cm" svg:stroke-color="#3465a4" draw:marker-start-width="0.279cm" draw:marker-end-width="0.279cm" draw:fill="solid" draw:fill-color="#b3cac7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331cm" fo:padding-top="0.222cm" fo:padding-bottom="0.222cm" fo:padding-left="0.347cm" fo:padding-right="0.347cm" fo:wrap-option="wrap" loext:decorative="false"/>
    </style:style>
    <style:style style:name="gr40" style:family="graphic" style:parent-style-name="objectwithoutfill">
      <style:graphic-properties svg:stroke-width="0.203cm" svg:stroke-color="#729fcf" draw:marker-start-width="0.508cm" draw:marker-end="Arrow_20_short" draw:marker-end-width="0.61cm" svg:stroke-opacity="70%" draw:fill="none" draw:textarea-vertical-align="middle" fo:padding-top="0.227cm" fo:padding-bottom="0.227cm" fo:padding-left="0.352cm" fo:padding-right="0.352cm" loext:decorative="false"/>
    </style:style>
    <style:style style:name="gr41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46cm" fo:min-width="0.321cm" fo:padding-top="0.222cm" fo:padding-bottom="0.222cm" fo:padding-left="0.347cm" fo:padding-right="0.347cm" fo:wrap-option="wrap" loext:decorative="false"/>
    </style:style>
    <style:style style:name="gr43" style:family="graphic" style:parent-style-name="standard">
      <style:graphic-properties draw:stroke="none" draw:fill="solid" draw:fill-color="#ffffff" draw:textarea-vertical-align="middle" loext:decorative="fals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>
      <style:graphic-properties style:protect="size" loext:decorative="false"/>
    </style:style>
    <style:style style:name="pr1" style:family="presentation" style:parent-style-name="Per_20_defecte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a7500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e8f2a1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b4c7dc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b2b2b2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b3cac7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ca" fo:country="ES" fo:font-style="normal" style:text-underline-style="none" fo:font-weight="normal" fo:background-color="transparent" style:font-name-asian="DejaVu Sans" style:font-size-asian="13pt" style:language-asian="zxx" style:country-asian="none" style:font-style-asian="normal" style:font-weight-asian="normal" style:font-name-complex="DejaVu Sans" style:font-size-complex="13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draw:style-name="gr1" draw:text-style-name="P1" draw:layer="layout" svg:width="1.397cm" svg:height="1.397cm" svg:x="23.225cm" svg:y="11.414cm">
          <draw:image xlink:href="Pictures/10000001000000E1000000E1751AFAE2.png" xlink:type="simple" xlink:show="embed" xlink:actuate="onLoad" draw:mime-type="image/png">
            <text:p/>
          </draw:image>
        </draw:frame>
        <draw:frame draw:name="Picture 5" draw:style-name="gr2" draw:text-style-name="P2" draw:layer="layout" svg:width="3.723cm" svg:height="3.722cm" svg:x="13.082cm" svg:y="10.686cm">
          <draw:image xlink:href="Pictures/100000000000014000000140A5659EFF.jpg" xlink:type="simple" xlink:show="embed" xlink:actuate="onLoad" draw:mime-type="image/jpeg">
            <text:p/>
          </draw:image>
          <svg:desc>tree-wipp-lindau-coat-of-arms-clip-art.jpg</svg:desc>
        </draw:frame>
        <draw:frame draw:name="Picture 6" draw:style-name="gr2" draw:text-style-name="P2" draw:layer="layout" svg:width="3.722cm" svg:height="3.722cm" svg:x="17.919cm" svg:y="10.172cm">
          <draw:image xlink:href="Pictures/100000000000014000000140A5659EFF.jpg" xlink:type="simple" xlink:show="embed" xlink:actuate="onLoad" draw:mime-type="image/jpeg">
            <text:p/>
          </draw:image>
          <svg:desc>tree-wipp-lindau-coat-of-arms-clip-art.jpg</svg:desc>
        </draw:frame>
        <draw:line draw:name="Straight Connector 2" draw:style-name="gr3" draw:text-style-name="P2" draw:layer="layout" svg:x1="3.67cm" svg:y1="14.419cm" svg:x2="25.003cm" svg:y2="12.43cm">
          <text:p/>
        </draw:line>
        <draw:custom-shape draw:name="Rectangle 18" draw:style-name="gr4" draw:text-style-name="P3" draw:layer="layout" svg:width="21.401cm" svg:height="3.106cm" draw:transform="skewX (-0.00069813170079773) rotate (0.096342174710087) translate (3.674cm 14.42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3" draw:layer="layout" svg:width="21.4cm" svg:height="0.97cm" draw:transform="skewX (-0.00104719755119658) rotate (0.096342174710087) translate (3.897cm 16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3" draw:layer="layout" svg:width="21.3cm" svg:height="2.143cm" draw:transform="skewX (-0.000523598775598287) rotate (0.096342174710087) translate (3.819cm 15.3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5" draw:layer="layout" svg:width="3.466cm" svg:height="0.802cm" svg:x="9.552cm" svg:y="7.172cm">
          <text:p text:style-name="P4"><text:span text:style-name="T1">Precip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8" draw:text-style-name="P2" draw:layer="layout" svg:width="0.601cm" svg:height="1.808cm" svg:x="12.086cm" svg:y="8.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2" draw:style-name="gr9" draw:text-style-name="P6" draw:layer="layout" svg:width="2.921cm" svg:height="1.403cm" svg:x="16.032cm" svg:y="9.044cm">
          <text:p text:style-name="P4"><text:span text:style-name="T1">Evaporation </text:span><text:span text:style-name="T1">from so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0" draw:text-style-name="P2" draw:layer="layout" svg:width="0.043cm" svg:height="1.326cm" svg:x="19.782cm" svg:y="8.8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8" draw:style-name="gr2" draw:text-style-name="P2" draw:layer="layout" svg:width="2.407cm" svg:height="2.461cm" svg:x="18.661cm" svg:y="3.894cm">
          <draw:image xlink:href="Pictures/10000000000000DE000000E38ACC5699.jpg" xlink:type="simple" xlink:show="embed" xlink:actuate="onLoad" draw:mime-type="image/jpeg">
            <text:p/>
          </draw:image>
          <svg:desc>baixa (2).jpeg</svg:desc>
        </draw:frame>
        <draw:custom-shape draw:name="Rectangle 24" draw:style-name="gr11" draw:text-style-name="P5" draw:layer="layout" svg:width="4.622cm" svg:height="0.802cm" svg:x="18.103cm" svg:y="14.807cm">
          <text:p text:style-name="P4"><text:span text:style-name="T1">Root upt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6" draw:layer="layout" svg:width="4.064cm" svg:height="1.403cm" svg:x="13.576cm" svg:y="7.107cm">
          <text:p text:style-name="P4"><text:span text:style-name="T1">Evaporation of intercepted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13" draw:text-style-name="P2" draw:layer="layout" svg:width="1.019cm" svg:height="1.821cm" svg:x="14.462cm" svg:y="8.82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2" draw:style-name="gr14" draw:text-style-name="P2" draw:layer="layout" svg:width="0.135cm" svg:height="3.013cm" svg:x="17.505cm" svg:y="10.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3" draw:style-name="gr15" draw:text-style-name="P2" draw:layer="layout" svg:width="0.001cm" svg:height="1.397cm" svg:x="13.19cm" svg:y="11.01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7" draw:style-name="gr16" draw:text-style-name="P5" draw:layer="layout" svg:width="2.798cm" svg:height="1.353cm" svg:x="11.817cm" svg:y="12.214cm">
          <text:p text:style-name="P4"><text:span text:style-name="T1">Net </text:span></text:p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7" draw:text-style-name="P2" draw:layer="layout" svg:width="0.001cm" svg:height="0.939cm" svg:x="19.93cm" svg:y="13.8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5" draw:style-name="gr18" draw:text-style-name="P2" draw:layer="layout" svg:width="0.94cm" svg:height="0.127cm" svg:x="11.463cm" svg:y="13.14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7" draw:style-name="gr19" draw:text-style-name="P2" draw:layer="layout" svg:width="0.001cm" svg:height="1.85cm" svg:x="16.751cm" svg:y="15.81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8" draw:style-name="gr20" draw:text-style-name="P5" xml:id="id1" draw:id="id1" draw:layer="layout" svg:width="2.824cm" svg:height="0.802cm" svg:x="10.174cm" svg:y="13.973cm">
          <text:p text:style-name="P4"><text:span text:style-name="T1">Infil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" draw:text-style-name="P7" draw:layer="layout" svg:width="3.46cm" svg:height="0.852cm" svg:x="17.098cm" svg:y="16.421cm">
          <text:p text:style-name="P4"><text:span text:style-name="T1">Deep drain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6" draw:layer="layout" svg:width="2.994cm" svg:height="1.403cm" svg:x="18.353cm" svg:y="7.11cm">
          <text:p text:style-name="P4"><text:span text:style-name="T1">Woody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3" draw:text-style-name="P2" draw:layer="layout" svg:width="0.108cm" svg:height="2.439cm" svg:x="24.048cm" svg:y="8.62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1" draw:style-name="gr24" draw:text-style-name="P6" draw:layer="layout" svg:width="2.968cm" svg:height="1.403cm" svg:x="22.924cm" svg:y="7.123cm">
          <text:p text:style-name="P4"><text:span text:style-name="T1">Herb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5" draw:text-style-name="P2" draw:layer="layout" svg:width="2.919cm" svg:height="1.735cm" svg:x="20.687cm" svg:y="13.0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.604cm" svg:height="2.604cm" svg:x="9.993cm" svg:y="4.051cm">
          <draw:image xlink:href="Pictures/10000001000000E1000000E1B0665A3B.png" xlink:type="simple" xlink:show="embed" xlink:actuate="onLoad" draw:mime-type="image/png">
            <text:p/>
          </draw:image>
        </draw:frame>
        <draw:custom-shape draw:name="Rectangle 2" draw:style-name="gr26" draw:text-style-name="P5" draw:layer="layout" svg:width="3.086cm" svg:height="0.802cm" svg:x="11.652cm" svg:y="10.172cm"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5" draw:layer="layout" svg:width="2.078cm" svg:height="0.802cm" svg:x="8.196cm" svg:y="10.228cm">
          <text:p text:style-name="P4"><text:span text:style-name="T1">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8" draw:text-style-name="P2" draw:layer="layout" svg:width="1.016cm" svg:height="1.905cm" svg:x="9.385cm" svg:y="8.32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4" draw:style-name="gr29" draw:text-style-name="P2" draw:layer="layout" svg:width="0.001cm" svg:height="1.651cm" svg:x="15.292cm" svg:y="15.963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4" draw:style-name="gr30" draw:text-style-name="P5" draw:layer="layout" svg:width="3.209cm" svg:height="0.802cm" svg:x="11.971cm" svg:y="16.632cm">
          <text:p text:style-name="P4"><text:span text:style-name="T1">Capillarity 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8" draw:layer="layout" svg:width="1.668cm" svg:height="1.242cm" draw:transform="skewX (-0.000872664625997147) rotate (0.096342174710087) translate (8.377cm 12.74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32" draw:text-style-name="P2" draw:layer="layout" svg:width="0.001cm" svg:height="1.342cm" svg:x="9.13cm" svg:y="11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8" draw:style-name="gr33" draw:text-style-name="P5" draw:layer="layout" svg:width="1.551cm" svg:height="1.353cm" svg:x="8.469cm" svg:y="12.514cm">
          <text:p text:style-name="P4"><text:span text:style-name="T1">Snow me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34" draw:text-style-name="P2" draw:layer="layout" svg:width="0.151cm" svg:height="0.897cm" svg:x="11.263cm" svg:y="13.31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7" draw:style-name="gr35" draw:text-style-name="P2" draw:layer="layout" svg:width="0.508cm" svg:height="1.778cm" svg:x="4.667cm" svg:y="14.03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6" draw:style-name="gr36" draw:text-style-name="P5" draw:layer="layout" svg:width="2.824cm" svg:height="1.353cm" svg:x="4.402cm" svg:y="15.689cm">
          <text:p text:style-name="P4"><text:span text:style-name="T1">Satu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7" draw:text-style-name="P5" xml:id="id2" draw:id="id2" draw:layer="layout" svg:width="2.824cm" svg:height="1.353cm" svg:x="5.666cm" svg:y="12.4cm">
          <text:p text:style-name="P4"><text:span text:style-name="T1">Infilt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9" draw:layer="layout" svg:width="2.075cm" svg:height="1.403cm" svg:x="3.016cm" svg:y="12.606cm">
          <text:p text:style-name="P4"><text:span text:style-name="T1">Surface </text:span></text:p>
          <text:p text:style-name="P4"><text:span text:style-name="T1">run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39" draw:text-style-name="P2" draw:layer="layout" svg:width="1.024cm" svg:height="0.14cm" svg:x="10.147cm" svg:y="13.3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onnector draw:style-name="gr40" draw:text-style-name="P1" draw:layer="layout" svg:x1="10.174cm" svg:y1="14.374cm" svg:x2="7.078cm" svg:y2="13.753cm" draw:start-shape="id1" draw:start-glue-point="3" draw:end-shape="id2" draw:end-glue-point="2" svg:d="M10174 14374h-3096v-621" svg:viewBox="0 0 3097 622">
          <text:p/>
        </draw:connector>
        <draw:custom-shape draw:name="Straight Arrow Connector 9" draw:style-name="gr18" draw:text-style-name="P2" draw:layer="layout" svg:width="0.94cm" svg:height="0.127cm" svg:x="5.171cm" svg:y="13.26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11" draw:style-name="gr41" draw:text-style-name="P6" draw:layer="layout" svg:width="2.968cm" svg:height="1.403cm" svg:x="20.765cm" svg:y="8.774cm">
          <text:p text:style-name="P4"><text:span text:style-name="T1">Mistletoe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42" draw:text-style-name="P2" draw:layer="layout" svg:width="1.014cm" svg:height="0.889cm" svg:x="21.322cm" svg:y="10.3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path draw:style-name="gr43" draw:text-style-name="P10" draw:layer="layout" svg:width="1.016cm" svg:height="0.887cm" draw:transform="skewX (0.0010471975511966) rotate (0.00401425727958696) translate (20.1747682279738cm 10.2729636683565cm)" svg:viewBox="0 0 1017 888" svg:d="M78 544c15-67 39-131 39-201 0-86 66-146 110-207s112-93 177-116c61-22 128-26 194-13 63 13 124 40 176 80 60 47 108 102 183 128 92 32 58 114 33 159-33 59-21 145-61 201-44 62-122 80-188 110-65 30-130 62-193 98-68 39-146 54-216 85-64 29-133 18-198 18-52 1-144-18-133-103v-61l16-49z">
          <text:p/>
        </draw:path>
        <draw:path draw:style-name="gr43" draw:text-style-name="P10" draw:layer="layout" svg:width="1.016cm" svg:height="0.887cm" draw:transform="skewX (0.0010471975511966) rotate (0.00401425727958696) translate (20.5557682279738cm 10.2729636683565cm)" svg:viewBox="0 0 1017 888" svg:d="M78 544c15-67 39-131 39-201 0-86 66-146 110-207s112-93 177-116c61-22 128-26 194-13 63 13 124 40 176 80 60 47 108 102 183 128 92 32 58 114 33 159-33 59-21 145-61 201-44 62-122 80-188 110-65 30-130 62-193 98-68 39-146 54-216 85-64 29-133 18-198 18-52 1-144-18-133-103v-61l16-49z">
          <text:p/>
        </draw:path>
        <draw:frame draw:style-name="gr44" draw:text-style-name="P11" draw:layer="layout" svg:width="1.945cm" svg:height="1.945cm" draw:transform="rotate (2.47470234640276) translate (20.816cm 12.113cm)">
          <draw:image xlink:href="Pictures/10000001000003AA000003AA48348AEB.png" xlink:type="simple" xlink:show="embed" xlink:actuate="onLoad" draw:mime-type="image/png">
            <text:p/>
          </draw:image>
        </draw:frame>
        <presentation:notes draw:style-name="dp2">
          <draw:page-thumbnail draw:style-name="gr4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axial" draw:start="37%" draw:end="37%" draw:angle="185.6deg" draw:border="0%">
      <loext:opacity-stop svg:offset="1" svg:stop-opacity="0.372549019607843"/>
    </draw:opacity>
    <draw:marker draw:name="Arrow" svg:viewBox="0 0 20 30" svg:d="M10 0l-10 30h20z"/>
    <draw:marker draw:name="Arrow_20_short" draw:display-name="Arrow short" svg:viewBox="0 0 20 13" svg:d="M0 13l10-13 10 13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r_20_defecte-title" draw:layer="backgroundobjects" svg:width="23.345cm" svg:height="3.27cm" svg:x="2.297cm" svg:y="1.781cm" presentation:class="title" presentation:placeholder="true">
        <draw:text-box/>
      </draw:frame>
      <draw:frame presentation:style-name="Per_20_defecte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2:12:56.967040667</meta:creation-date>
    <dc:date>2026-06-18T11:50:58.956146191</dc:date>
    <meta:editing-duration>PT3H30M57S</meta:editing-duration>
    <meta:editing-cycles>28</meta:editing-cycles>
    <meta:generator>LibreOffice/24.2.7.2$Linux_X86_64 LibreOffice_project/420$Build-2</meta:generator>
    <meta:document-statistic meta:object-count="69"/>
  </office:meta>
</office:document-meta>
</file>