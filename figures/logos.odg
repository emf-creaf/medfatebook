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1358300005917000015E0AB0FC6AE.svg" manifest:media-type="image/svg+xml"/>
  <manifest:file-entry manifest:full-path="Pictures/100000010000035E000000D44BAE4C78.png" manifest:media-type="image/png"/>
  <manifest:file-entry manifest:full-path="Pictures/100000000000017E00000084E39B1E5A.png" manifest:media-type="image/png"/>
  <manifest:file-entry manifest:full-path="Pictures/10000000000001A2000000784FDC0FD5.jpg" manifest:media-type="image/jpeg"/>
  <manifest:file-entry manifest:full-path="Pictures/10000000000004B60000016ED41220F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15cm" fo:min-width="17.3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7.8cm" svg:height="8.4cm" svg:x="1.4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974cm" svg:height="3.027cm" svg:x="1.226cm" svg:y="4.1cm">
          <draw:image xlink:href="Pictures/10000000000004B60000016ED41220F5.jpg" xlink:type="simple" xlink:show="embed" xlink:actuate="onLoad" draw:mime-type="image/jpeg">
            <text:p/>
          </draw:image>
        </draw:frame>
        <draw:frame draw:style-name="gr2" draw:text-style-name="P2" draw:layer="layout" svg:width="7.373cm" svg:height="2.116cm" svg:x="2.027cm" svg:y="7.958cm">
          <draw:image xlink:href="Pictures/10000000000001A2000000784FDC0FD5.jpg" xlink:type="simple" xlink:show="embed" xlink:actuate="onLoad" draw:mime-type="image/jpeg">
            <text:p/>
          </draw:image>
        </draw:frame>
        <draw:frame draw:style-name="gr2" draw:text-style-name="P2" draw:layer="layout" svg:width="6.337cm" svg:height="2.19cm" svg:x="11.8cm" svg:y="7.91cm">
          <draw:image xlink:href="Pictures/100000000000017E00000084E39B1E5A.png" xlink:type="simple" xlink:show="embed" xlink:actuate="onLoad" draw:mime-type="image/png">
            <text:p/>
          </draw:image>
        </draw:frame>
        <draw:frame draw:style-name="gr3" draw:text-style-name="P3" draw:layer="layout" svg:width="7.081cm" svg:height="1.738cm" svg:x="11.6cm" svg:y="5cm">
          <draw:image xlink:href="Pictures/1001358300005917000015E0AB0FC6AE.svg" xlink:type="simple" xlink:show="embed" xlink:actuate="onLoad" draw:mime-type="image/svg+xml">
            <text:p/>
          </draw:image>
          <draw:image xlink:href="Pictures/100000010000035E000000D44BAE4C7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6-05-12T13:14:24.214186728</dc:date>
    <meta:editing-duration>PT4H7M36S</meta:editing-duration>
    <meta:editing-cycles>42</meta:editing-cycles>
    <meta:generator>LibreOffice/24.2.7.2$Linux_X86_64 LibreOffice_project/420$Build-2</meta:generator>
    <meta:document-statistic meta:object-count="5"/>
  </office:meta>
</office:document-meta>
</file>